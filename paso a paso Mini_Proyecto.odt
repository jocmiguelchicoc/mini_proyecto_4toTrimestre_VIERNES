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A000003823F538827.png" manifest:media-type="image/png"/>
  <manifest:file-entry manifest:full-path="Pictures/10000001000002BD000002447961E457.png" manifest:media-type="image/png"/>
  <manifest:file-entry manifest:full-path="Pictures/10000001000003790000030E686DA741.png" manifest:media-type="image/png"/>
  <manifest:file-entry manifest:full-path="Pictures/1000000100000780000003D148F86A88.png" manifest:media-type="image/png"/>
  <manifest:file-entry manifest:full-path="Pictures/1000000100000194000001F7A465FD2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08ffe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 style:list-style-name="L2">
      <style:paragraph-properties fo:margin-left="0cm" fo:margin-right="0cm" fo:text-indent="0cm" style:auto-text-indent="false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 style:list-style-name="L3">
      <style:paragraph-properties fo:margin-left="0cm" fo:margin-right="0cm" fo:text-indent="0cm" style:auto-text-indent="false"/>
    </style:style>
    <style:style style:name="P7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ext_20_body" style:list-style-name="L4">
      <style:paragraph-properties fo:margin-left="0cm" fo:margin-right="0cm" fo:text-indent="0cm" style:auto-text-indent="false"/>
    </style:style>
    <style:style style:name="P9" style:family="paragraph" style:parent-style-name="Text_20_body" style:list-style-name="L5">
      <style:paragraph-properties fo:margin-left="0cm" fo:margin-right="0cm" fo:text-indent="0cm" style:auto-text-indent="false"/>
    </style:style>
    <style:style style:name="P10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11" style:family="paragraph" style:parent-style-name="Text_20_body" style:list-style-name="L6">
      <style:paragraph-properties fo:margin-left="0cm" fo:margin-right="0cm" fo:text-indent="0cm" style:auto-text-indent="false"/>
    </style:style>
    <style:style style:name="P12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13" style:family="paragraph" style:parent-style-name="Text_20_body">
      <style:text-properties officeooo:paragraph-rsid="0009a415"/>
    </style:style>
    <style:style style:name="P14" style:family="paragraph" style:parent-style-name="Heading_20_3">
      <style:text-properties officeooo:paragraph-rsid="0009a415"/>
    </style:style>
    <style:style style:name="P15" style:family="paragraph" style:parent-style-name="Text_20_body" style:list-style-name="L7">
      <style:paragraph-properties fo:margin-left="0cm" fo:margin-right="0cm" fo:text-indent="0cm" style:auto-text-indent="false"/>
    </style:style>
    <style:style style:name="P16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17" style:family="paragraph" style:parent-style-name="Text_20_body" style:list-style-name="L8">
      <style:paragraph-properties fo:margin-left="0cm" fo:margin-right="0cm" fo:text-indent="0cm" style:auto-text-indent="false"/>
    </style:style>
    <style:style style:name="P18" style:family="paragraph" style:parent-style-name="Text_20_body" style:list-style-name="L9"/>
    <style:style style:name="T1" style:family="text">
      <style:text-properties fo:font-weight="bold"/>
    </style:style>
    <style:style style:name="T2" style:family="text">
      <style:text-properties style:font-name="Liberation Mono" fo:font-weight="bold"/>
    </style:style>
    <style:style style:name="T3" style:family="text">
      <style:text-properties style:font-name="Liberation Mono"/>
    </style:style>
    <style:style style:name="T4" style:family="text">
      <style:text-properties fo:font-style="italic"/>
    </style:style>
    <style:style style:name="T5" style:family="text">
      <style:text-properties officeooo:rsid="0008ffee"/>
    </style:style>
    <style:style style:name="T6" style:family="text">
      <style:text-properties officeooo:rsid="0009a41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Paso 1: Estructuración y Organización del Proyecto</text:h>
      <text:p text:style-name="Text_20_body"><draw:frame draw:style-name="fr1" draw:name="Image1" text:anchor-type="char" svg:width="10.689cm" svg:height="13.309cm" draw:z-index="0"><draw:image xlink:href="Pictures/1000000100000194000001F7A465FD21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Para comenzar a trabajar con el sistema de la biblioteca, lo primero que hice fue organizar las carpetas y archivos en mi entorno de desarrollo. Decidí estructurarlo de la siguiente manera para mantener un orden claro entre la configuración del servidor, los datos del proyecto y la documentación:</text:p>
      <text:list text:style-name="L1">
        <text:list-item>
          <text:p text:style-name="P1"><text:span text:style-name="T1">Carpeta </text:span><text:span text:style-name="T2">initdb/</text:span>: Esta carpeta la cree específicamente para automatizar la inicialización de la base de datos. Dentro de ella coloqué dos archivos ordenados numéricamente:</text:p>
          <text:list>
            <text:list-item>
              <text:p text:style-name="P1"><text:span text:style-name="T3">1_script_creacion_tablas.sql</text:span>: Que contiene la estructura de las tablas.</text:p>
            </text:list-item>
            <text:list-item>
              <text:p text:style-name="P1"><text:span text:style-name="T3">2_script_insercion_datos.sql</text:span>: Que tiene los datos de prueba listos para cargar. <text:span text:style-name="T4">Nota: Ponerlos en esta carpeta permite que, al levantar el contenedor por primera vez, la base de datos cargue todo sola de forma ordenada.</text:span></text:p>
            </text:list-item>
          </text:list>
        </text:list-item>
        <text:list-item>
          <text:p text:style-name="P1"><text:span text:style-name="T1">Carpeta </text:span><text:span text:style-name="T2">mini-proyecto/</text:span>: En esta carpeta agrupé todos los archivos entregables solicitados para la entrega del proyecto:</text:p>
          <text:list>
            <text:list-item>
              <text:p text:style-name="P1"><text:span text:style-name="T3">enunciado.md</text:span>: Donde documenté los requisitos del problema.</text:p>
            </text:list-item>
            <text:list-item>
              <text:p text:style-name="P2"><text:span text:style-name="T3">reflexion.md</text:span>: Un análisis reflexivo sobre el diseño de la base de datos <text:span text:style-name="T5">y los problemas que tuve</text:span></text:p>
              <text:p text:style-name="P2">.</text:p>
            </text:list-item>
            <text:list-item>
              <text:p text:style-name="P1"><text:soft-page-break/><text:span text:style-name="T3">script_creacion_tablas.sql</text:span> y <text:span text:style-name="T3">script_insercion_datos.sql</text:span>: Copias de los scripts principales del proyecto.</text:p>
            </text:list-item>
            <text:list-item>
              <text:p text:style-name="P1"><text:span text:style-name="T3">consultas_validacion.sql</text:span>: Un archivo con las consultas que diseñé para comprobar que todo funcione bien.</text:p>
            </text:list-item>
          </text:list>
        </text:list-item>
        <text:list-item>
          <text:p text:style-name="P1"><text:span text:style-name="T1">Archivo </text:span><text:span text:style-name="T2">docker-compose.yml</text:span>: Este es el archivo que configuré para levantar los servicios de la base de datos PostgreSQL y pgAdmin usando Docker, permitiéndome trabajar en un entorno local y aislado.</text:p>
        </text:list-item>
        <text:list-item>
          <text:p text:style-name="P1"><text:span text:style-name="T1">Archivo </text:span><text:span text:style-name="T2">EVALUACION MODULO RELACIONAL.pdf</text:span>: El documento guía del examen con todas las pautas de la actividad.</text:p>
        </text:list-item>
      </text:list>
      <text:p text:style-name="Horizontal_20_Line"/>
      <text:h text:style-name="Heading_20_3" text:outline-level="3"><text:bookmark text:name="user-content-paso-2-creación-de-tablas-y-definición-del-modelo-relacional"/>Paso 2: Creación de Tablas y Definición del Modelo Relacional</text:h>
      <text:p text:style-name="P3">En este paso, me dediqué a programar el script SQL para crear la estructura de la base de datos de la biblioteca. Mi objetivo fue definir correctamente las tablas, sus relaciones y todas las reglas de validación para asegurar que no entren datos incorrectos al sistema.</text:p>
      <text:list text:style-name="L2">
        <text:list-item>
          <text:p text:style-name="P4"><text:span text:style-name="Strong_20_Emphasis">Definición del Esquema (</text:span><text:span text:style-name="Strong_20_Emphasis"><text:span text:style-name="Source_20_Text">CREATE SCHEMA</text:span></text:span><text:span text:style-name="Strong_20_Emphasis">)</text:span>: Para iniciar con el pie derecho y mantener mi base de datos limpia y ordenada, utilicé la instrucción <text:span text:style-name="Source_20_Text">DROP SCHEMA IF EXISTS biblioteca CASCADE;</text:span> seguida de <text:span text:style-name="Source_20_Text">CREATE SCHEMA IF NOT EXISTS biblioteca;</text:span>. Esto me permite reiniciar la estructura del esquema <text:span text:style-name="Source_20_Text">biblioteca</text:span> desde cero cada vez que ejecuto el script, asegurando que no queden tablas viejas que puedan causar conflictos.</text:p>
        </text:list-item>
        <text:list-item>
          <text:p text:style-name="P4"><text:span text:style-name="Strong_20_Emphasis">Creación de Tablas Independientes (Categorías, Autores y Usuarios)</text:span>: Siguiendo las buenas prácticas, primero creé las tablas que no dependen de llaves foráneas para que luego no haya errores de referencia:</text:p>
          <text:list>
            <text:list-item>
              <text:p text:style-name="P5"><text:span text:style-name="Strong_20_Emphasis"><text:span text:style-name="Source_20_Text">categorias</text:span></text:span>: Sirve para clasificar los libros. Le asigné una llave primaria autoincremental (<text:span text:style-name="Source_20_Text">id_categoria SERIAL PRIMARY KEY</text:span>) y una restricción <text:span text:style-name="Source_20_Text">UNIQUE</text:span> en el nombre para evitar duplicados.</text:p>
            </text:list-item>
            <text:list-item>
              <text:p text:style-name="P5"><text:span text:style-name="Strong_20_Emphasis"><text:span text:style-name="Source_20_Text">autores</text:span></text:span>: Almacena a los escritores (<text:span text:style-name="Source_20_Text">id_autor SERIAL PRIMARY KEY</text:span>, nombre y nacionalidad). La lógica es que cada autor se registre una única vez en esta tabla.</text:p>
            </text:list-item>
            <text:list-item>
              <text:p text:style-name="P5"><text:span text:style-name="Strong_20_Emphasis"><text:span text:style-name="Source_20_Text">usuarios</text:span></text:span>: Almacena a las personas que prestan libros. Aquí usé la restricción <text:span text:style-name="Source_20_Text">UNIQUE</text:span> en el correo electrónico para evitar cuentas duplicadas con el mismo correo, y configuré la fecha de registro automáticamente con la fecha del día actual usando <text:span text:style-name="Source_20_Text">DEFAULT CURRENT_DATE</text:span>.</text:p>
            </text:list-item>
          </text:list>
        </text:list-item>
        <text:list-item>
          <text:p text:style-name="P4"><text:span text:style-name="Strong_20_Emphasis">Creación de Tablas Relacionales (Libros y Préstamos)</text:span>: Con las tablas base listas, creé las tablas dependientes que entrelazan toda la información:</text:p>
          <text:list>
            <text:list-item>
              <text:p text:style-name="P4"><text:span text:style-name="Strong_20_Emphasis"><text:span text:style-name="Source_20_Text">libros</text:span></text:span>: Esta tabla almacena los libros y se relaciona con autores y categorías.</text:p>
              <text:list>
                <text:list-item>
                  <text:p text:style-name="P5"><text:span text:style-name="Strong_20_Emphasis">Relaciones y llaves foráneas</text:span>: Utilicé <text:span text:style-name="Source_20_Text">CONSTRAINT fk_autor</text:span> y <text:span text:style-name="Source_20_Text">CONSTRAINT fk_categoria</text:span> para asociar cada libro con su respectivo autor y categoría.</text:p>
                </text:list-item>
                <text:list-item>
                  <text:p text:style-name="P5"><text:soft-page-break/><text:span text:style-name="Strong_20_Emphasis">Integridad en cascada</text:span>: Les añadí <text:span text:style-name="Source_20_Text">ON DELETE CASCADE ON UPDATE CASCADE</text:span>. Esto es para que si se borra o actualiza un autor o categoría, los libros asociados se actualicen o eliminen solos en cascada, evitando dejar datos huérfanos.</text:p>
                </text:list-item>
                <text:list-item>
                  <text:p text:style-name="P5"><text:span text:style-name="Strong_20_Emphasis">ISBN</text:span>: Lo definí como <text:span text:style-name="Source_20_Text">UNIQUE</text:span> porque cada libro físico tiene un código único a nivel mundial.</text:p>
                </text:list-item>
              </text:list>
            </text:list-item>
            <text:list-item>
              <text:p text:style-name="P4"><text:span text:style-name="Strong_20_Emphasis"><text:span text:style-name="Source_20_Text">prestamos</text:span></text:span>: Esta tabla es el núcleo de la base de datos, pues controla quién se lleva cada libro y cuándo.</text:p>
              <text:list>
                <text:list-item>
                  <text:p text:style-name="P5"><text:span text:style-name="Strong_20_Emphasis">Lógica de fechas</text:span>: La fecha de préstamo se coloca sola con la fecha actual. La de devolución esperada es obligatoria, y la fecha de devolución real queda como opcional (vacía al principio) porque se llena únicamente cuando el usuario devuelve el libro físicamente.</text:p>
                </text:list-item>
                <text:list-item>
                  <text:p text:style-name="P5"><text:span text:style-name="Strong_20_Emphasis">Acción en cascada</text:span>: Al igual que en libros, si se elimina un usuario o un libro, su historial de préstamos se elimina para mantener limpia la base de datos.</text:p>
                </text:list-item>
                <text:list-item>
                  <text:p text:style-name="P5"><text:span text:style-name="Strong_20_Emphasis">Validaciones adicionales (Chequeos </text:span><text:span text:style-name="Strong_20_Emphasis"><text:span text:style-name="Source_20_Text">CHECK</text:span></text:span><text:span text:style-name="Strong_20_Emphasis">)</text:span>: Para que el sistema sea seguro frente a errores humanos, agregué dos reglas de negocio estrictas:</text:p>
                  <text:list>
                    <text:list-item>
                      <text:p text:style-name="P5"><text:span text:style-name="Source_20_Text">chk_fechas</text:span>: Asegura que la fecha en la que se espera la devolución del libro sea igual o posterior al día en que se prestó (<text:span text:style-name="Source_20_Text">fecha_devolucion_esperada &gt;= fecha_prestamo</text:span>). Así se evita registrar fechas de devolución en el pasado.</text:p>
                    </text:list-item>
                    <text:list-item>
                      <text:p text:style-name="P4"><text:span text:style-name="Source_20_Text">chk_estado</text:span>: Restringe el campo <text:span text:style-name="Source_20_Text">estado</text:span> para que solo acepte las palabras <text:span text:style-name="Source_20_Text">'ACTIVO'</text:span>, <text:span text:style-name="Source_20_Text">'DEVUELTO'</text:span> o <text:span text:style-name="Source_20_Text">'VENCIDO'</text:span>, impidiendo ingresar estados incorrectos.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 text:is-list-header="true"><text:bookmark text:name="user-content-paso-3-inserción-de-datos-de-prueba-y-población-de-la-base-de-datos"/>Paso 3: Inserción de Datos de Prueba y Población de la Base de Datos</text:h>
      <text:p text:style-name="P3">Con la base de datos estructurada y vacía, el siguiente paso fue poblarla con registros reales para poder realizar pruebas y verificar que todas las relaciones y restricciones que configuré en el paso anterior funcionen de manera correcta.</text:p>
      <text:list text:style-name="L3">
        <text:list-item>
          <text:p text:style-name="P6"><text:span text:style-name="Strong_20_Emphasis">Inserción de Datos en las Tablas Independientes (Paso a Paso)</text:span>:</text:p>
          <text:list>
            <text:list-item>
              <text:p text:style-name="P7"><text:span text:style-name="Strong_20_Emphasis">Categorías</text:span>: Inserté cinco géneros literarios clásicos (como <text:span text:style-name="Emphasis">Poesía, Novela, Cuento, Ensayo y Literatura</text:span>).</text:p>
            </text:list-item>
            <text:list-item>
              <text:p text:style-name="P7"><text:span text:style-name="Strong_20_Emphasis">Autores</text:span>: Registré cinco autores reconocidos internacionalmente con sus respectivas nacionalidades (por ejemplo, <text:span text:style-name="Emphasis">Gabriel García Márquez</text:span> como colombiano o <text:span text:style-name="Emphasis">Julio Cortázar</text:span> como argentino).</text:p>
            </text:list-item>
            <text:list-item>
              <text:p text:style-name="P7"><text:span text:style-name="Strong_20_Emphasis">Usuarios</text:span>: Creé cuentas de prueba para cinco usuarios, asignándoles nombres completos, números de teléfono simulados y correos únicos que cumplieran con la restricción <text:span text:style-name="Source_20_Text">UNIQUE</text:span>.</text:p>
            </text:list-item>
          </text:list>
        </text:list-item>
        <text:list-item>
          <text:p text:style-name="P6"><text:span text:style-name="Strong_20_Emphasis">Inserción de Libros Relacionados</text:span>: Para registrar los libros en la base de datos, tuve cuidado de relacionarlos con los números de identificación (<text:span text:style-name="Source_20_Text">id_autor</text:span> e <text:span text:style-name="Source_20_Text">id_categoria</text:span>) generados en los pasos anteriores. Registré títulos famosos (como <text:span text:style-name="Emphasis">Cien años de soledad</text:span> y <text:span text:style-name="Emphasis">Rayuela</text:span>) asociándoles su código ISBN único mundial y vinculándolos a sus autores y categorías correspondientes.</text:p>
        </text:list-item>
        <text:list-item>
          <text:p text:style-name="P6"><text:soft-page-break/><text:span text:style-name="Strong_20_Emphasis">Inserción de Préstamos</text:span>: Inserté varios préstamos para simular el uso cotidiano de la biblioteca escolar:</text:p>
          <text:list>
            <text:list-item>
              <text:p text:style-name="P7">Registré préstamos con estado <text:span text:style-name="Source_20_Text">'ACTIVO'</text:span> para libros que todavía están en manos de los estudiantes.</text:p>
            </text:list-item>
            <text:list-item>
              <text:p text:style-name="P7">Registré préstamos con estado <text:span text:style-name="Source_20_Text">'DEVUELTO'</text:span> para aquellos libros que ya fueron entregados.</text:p>
            </text:list-item>
            <text:list-item>
              <text:p text:style-name="P7">Creé un par de registros simulando casos de préstamos <text:span text:style-name="Source_20_Text">'VENCIDO'</text:span>, donde la fecha de devolución esperada era anterior a la fecha límite sin que el libro hubiese sido entregado, lo cual sirve para probar reportes de retrasos.</text:p>
            </text:list-item>
          </text:list>
        </text:list-item>
        <text:list-item>
          <text:p text:style-name="P6"><text:span text:style-name="Strong_20_Emphasis">Actualización de Entregas (</text:span><text:span text:style-name="Strong_20_Emphasis"><text:span text:style-name="Source_20_Text">UPDATE</text:span></text:span><text:span text:style-name="Strong_20_Emphasis">)</text:span>: Para completar el ciclo de préstamo de los libros que ya habían sido marcados como devueltos, utilicé sentencias <text:span text:style-name="Source_20_Text">UPDATE</text:span>. Con ellas, les asigné la fecha real de devolución exacta (<text:span text:style-name="Source_20_Text">fecha_devolucion_real</text:span>) a esos registros específicos de préstamos, demostrando cómo el sistema registra el cierre del proceso cuando el alumno regresa el libro físico.</text:p>
        </text:list-item>
      </text:list>
      <text:h text:style-name="Heading_20_3" text:outline-level="3"><text:bookmark text:name="user-content-paso-4-consultas-de-validación-y-análisis-de-datos"/>Paso 4: Consultas de Validación y Análisis de Datos</text:h>
      <text:p text:style-name="P3">Para comprobar el correcto funcionamiento del modelo relacional y demostrar la utilidad de la base de datos ante diferentes requerimientos prácticos de la biblioteca, diseñé un conjunto de consultas SQL utilizando uniones de tablas (<text:span text:style-name="Source_20_Text">JOIN</text:span>), agrupaciones y filtros específicos:</text:p>
      <text:list text:style-name="L4">
        <text:list-item>
          <text:p text:style-name="P8"><text:span text:style-name="Strong_20_Emphasis">Listar libros con su autor y categoría</text:span>: Esta consulta combina las tablas <text:span text:style-name="Source_20_Text">libros</text:span>, <text:span text:style-name="Source_20_Text">autores</text:span> y <text:span text:style-name="Source_20_Text">categorias</text:span> usando uniones simples (<text:span text:style-name="Source_20_Text">JOIN</text:span>). Permite mostrar un catálogo limpio en el que vemos el título de la obra, el nombre del autor y el género al que pertenece, en lugar de códigos numéricos de ID.</text:p>
        </text:list-item>
        <text:list-item>
          <text:p text:style-name="P8"><text:span text:style-name="Strong_20_Emphasis">Listar préstamos activos</text:span>: Une la tabla <text:span text:style-name="Source_20_Text">prestamos</text:span> con <text:span text:style-name="Source_20_Text">usuarios</text:span> y <text:span text:style-name="Source_20_Text">libros</text:span>, filtrando el resultado mediante <text:span text:style-name="Source_20_Text">WHERE estado = 'ACTIVO'</text:span>. Sirve para saber de inmediato qué libros están fuera de la biblioteca en este momento, quién los tiene y cuándo deben entregarse.</text:p>
        </text:list-item>
        <text:list-item>
          <text:p text:style-name="P8"><text:span text:style-name="Strong_20_Emphasis">Consultar préstamos de un usuario específico</text:span>: Permite buscar el historial de alquileres de una persona en particular filtrando por su código (<text:span text:style-name="Source_20_Text">id_usuario = 1</text:span>). Muestra los títulos de los libros que ha retirado, las fechas de cada transacción y el estado del préstamo.</text:p>
        </text:list-item>
        <text:list-item>
          <text:p text:style-name="P8"><text:span text:style-name="Strong_20_Emphasis">Identificar libros disponibles (Sin préstamos activos)</text:span>: Utilicé una subconsulta con <text:span text:style-name="Source_20_Text">NOT IN</text:span> para encontrar aquellos libros que en este momento no se encuentran en ningún préstamo con estado <text:span text:style-name="Source_20_Text">'ACTIVO'</text:span>. Es de gran ayuda para saber qué libros están disponibles en los estantes para ser prestados.</text:p>
        </text:list-item>
        <text:list-item>
          <text:p text:style-name="P8"><text:span text:style-name="Strong_20_Emphasis">Contar préstamos por usuario</text:span>: Combina <text:span text:style-name="Source_20_Text">usuarios</text:span> con <text:span text:style-name="Source_20_Text">prestamos</text:span> usando un <text:span text:style-name="Source_20_Text">LEFT JOIN</text:span> (para incluir incluso a aquellos alumnos que no han prestado ningún libro) y utiliza la función de agregación <text:span text:style-name="Source_20_Text">COUNT</text:span> agrupando por el nombre del usuario (<text:span text:style-name="Source_20_Text">GROUP BY</text:span>). Ordena la lista de mayor a menor (<text:span text:style-name="Source_20_Text">ORDER BY DESC</text:span>) para ver de forma rápida a nuestros lectores más frecuentes.</text:p>
        </text:list-item>
        <text:list-item>
          <text:p text:style-name="P8"><text:span text:style-name="Strong_20_Emphasis">Consultar préstamos vencidos</text:span>: Filtra los préstamos que tienen el estado <text:span text:style-name="Source_20_Text">'VENCIDO'</text:span> o aquellos que siguen <text:span text:style-name="Source_20_Text">'ACTIVO'</text:span> pero cuya fecha límite de devolución ya pasó con respecto <text:soft-page-break/>a la fecha actual (<text:span text:style-name="Source_20_Text">fecha_devolucion_esperada &lt; CURRENT_DATE</text:span>). Sirve para generar un reporte automático de alertas de retraso.</text:p>
        </text:list-item>
        <text:list-item>
          <text:p text:style-name="P8"><text:span text:style-name="Strong_20_Emphasis">Mostrar libros prestados con fecha esperada de entrega</text:span>: Presenta una lista rápida de todos los títulos que están prestados en la actualidad (<text:span text:style-name="Source_20_Text">ACTIVO</text:span>), indicando directamente a qué usuario le fueron entregados y cuál es el plazo límite para su devolución.</text:p>
        </text:list-item>
        <text:list-item>
          <text:p text:style-name="P8"><text:span text:style-name="Strong_20_Emphasis">Clasificación de usuarios por número de préstamos</text:span>: Utiliza la combinación de <text:span text:style-name="Source_20_Text">LEFT JOIN</text:span> y la función <text:span text:style-name="Source_20_Text">COUNT</text:span> para generar una lista clasificada de los estudiantes</text:p>
        </text:list-item>
      </text:list>
      <text:p text:style-name="Text_20_body"/>
      <text:p text:style-name="Text_20_body"><draw:frame draw:style-name="fr2" draw:name="Image2" text:anchor-type="char" svg:x="-0.132cm" svg:y="-0.051cm" svg:width="17cm" svg:height="8.65cm" draw:z-index="1"><draw:image xlink:href="Pictures/1000000100000780000003D148F86A88.png" xlink:type="simple" xlink:show="embed" xlink:actuate="onLoad" draw:mime-type="image/png"/></draw:frame></text:p>
      <text:h text:style-name="Heading_20_3" text:outline-level="3"><text:bookmark text:name="user-content-paso-7-acceso-a-pgadmin-interfaz-gráfica"/>Paso <text:span text:style-name="T6">5</text:span>: Acceso a pgAdmin (Interfaz Gráfica)</text:h>
      <text:p text:style-name="P3">Con los contenedores en marcha, abrí el navegador de internet e ingresé a la dirección <text:span text:style-name="Source_20_Text">http://localhost:8081</text:span> para acceder a la herramienta de administración visual pgAdmin.</text:p>
      <text:p text:style-name="P3">En la pantalla de inicio de sesión, realicé los siguientes pasos:</text:p>
      <text:list text:style-name="L5">
        <text:list-item>
          <text:p text:style-name="P9"><text:span text:style-name="Strong_20_Emphasis">Selección de Idioma</text:span>: Cambié el idioma de la interfaz a <text:span text:style-name="Strong_20_Emphasis">Spanish</text:span> (Español) en el menú desplegable inferior para facilitar la navegación dentro de la plataforma.</text:p>
        </text:list-item>
        <text:list-item>
          <text:p text:style-name="P9"><text:span text:style-name="Strong_20_Emphasis">Ingreso de Credenciales</text:span>: Coloqué los datos de acceso que configuré previamente en el archivo de Docker:</text:p>
          <text:list>
            <text:list-item>
              <text:p text:style-name="P10"><text:span text:style-name="Strong_20_Emphasis">Email Address / Username</text:span>: <text:span text:style-name="Source_20_Text">admin@biblioteca.com</text:span></text:p>
            </text:list-item>
            <text:list-item>
              <text:p text:style-name="P10"><text:span text:style-name="Strong_20_Emphasis">Password</text:span>: <text:span text:style-name="Source_20_Text">admin123</text:span></text:p>
            </text:list-item>
          </text:list>
        </text:list-item>
        <text:list-item>
          <text:p text:style-name="P9"><text:span text:style-name="Strong_20_Emphasis">Inicio de Sesión</text:span>: Hice clic en el botón azul <text:span text:style-name="Strong_20_Emphasis">Login</text:span> para ingresar al panel de control principal de pgAdmin.</text:p>
        </text:list-item>
      </text:list>
      <text:p text:style-name="Text_20_body"/>
      <text:p text:style-name="Text_20_body"/>
      <text:p text:style-name="Text_20_body"><draw:frame draw:style-name="fr3" draw:name="Image3" text:anchor-type="char" svg:width="17cm" svg:height="14.952cm" draw:z-index="2"><draw:image xlink:href="Pictures/10000001000003790000030E686DA741.png" xlink:type="simple" xlink:show="embed" xlink:actuate="onLoad" draw:mime-type="image/png"/></draw:frame><text:soft-page-break/></text:p>
      <text:h text:style-name="Heading_20_4" text:outline-level="4"><text:bookmark text:name="user-content-paso-8-registro-del-servidor-en-pgadmin"/>Paso 8: Registro del Servidor en pgAdmin</text:h>
      <text:p text:style-name="P3">Una vez dentro del panel de control de pgAdmin, procedí a registrar la conexión con el servidor de la base de datos de PostgreSQL configurado en el contenedor:</text:p>
      <text:list text:style-name="L6">
        <text:list-item>
          <text:p text:style-name="P11"><text:span text:style-name="Strong_20_Emphasis">Crear Servidor</text:span>: Hice clic derecho en la sección "Servers" y seleccioné <text:span text:style-name="Strong_20_Emphasis">Register -&gt; Server...</text:span> para abrir la ventana de configuración.</text:p>
        </text:list-item>
        <text:list-item>
          <text:p text:style-name="P11"><text:span text:style-name="Strong_20_Emphasis">Configuración General</text:span>: En la pestaña <text:span text:style-name="Strong_20_Emphasis">General</text:span>, definí el nombre del servidor como <text:span text:style-name="Source_20_Text">Biblioteca Server</text:span> para identificarlo fácilmente dentro de la lista.</text:p>
        </text:list-item>
        <text:list-item>
          <text:p text:style-name="P11"><text:span text:style-name="Strong_20_Emphasis">Configuración de Conexión</text:span>: En la pestaña <text:span text:style-name="Strong_20_Emphasis">Conexión</text:span>, rellené los datos correspondientes a los parámetros definidos en el archivo docker:</text:p>
          <text:list>
            <text:list-item>
              <text:p text:style-name="P12"><text:span text:style-name="Strong_20_Emphasis">Nombre/Dirección de servidor</text:span>: <text:span text:style-name="Source_20_Text">postgres</text:span> (utilizando el nombre del servicio de la red interna de Docker).</text:p>
            </text:list-item>
            <text:list-item>
              <text:p text:style-name="P12"><text:span text:style-name="Strong_20_Emphasis">Puerto</text:span>: <text:span text:style-name="Source_20_Text">5432</text:span>.</text:p>
            </text:list-item>
            <text:list-item>
              <text:p text:style-name="P12"><text:span text:style-name="Strong_20_Emphasis">Base de datos de mantenimiento</text:span>: <text:span text:style-name="Source_20_Text">biblioteca_db</text:span> (la base de datos principal de nuestro proyecto).</text:p>
            </text:list-item>
            <text:list-item>
              <text:p text:style-name="P12"><text:span text:style-name="Strong_20_Emphasis">Nombre de usuario</text:span>: <text:span text:style-name="Source_20_Text">biblioteca_user</text:span>.</text:p>
            </text:list-item>
            <text:list-item>
              <text:p text:style-name="P11"><text:soft-page-break/><text:span text:style-name="Strong_20_Emphasis">Contraseña</text:span>: <text:span text:style-name="Source_20_Text">biblioteca_pass</text:span>.</text:p>
            </text:list-item>
          </text:list>
        </text:list-item>
      </text:list>
      <text:p text:style-name="Text_20_body"/>
      <text:p text:style-name="Text_20_body"><draw:frame draw:style-name="fr2" draw:name="Image4" text:anchor-type="char" svg:x="5.034cm" svg:y="0.071cm" svg:width="6.934cm" svg:height="15.803cm" draw:z-index="3"><draw:image xlink:href="Pictures/100000010000018A000003823F538827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13"><text:lin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14" text:outline-level="3"><text:bookmark text:name="user-content-paso-9-verificación-de-las-tablas-en-la-interfaz-de-pgadmin"/>Paso <text:span text:style-name="T6">6</text:span>: Verificación de las Tablas en la Interfaz de pgAdmin</text:h>
      <text:p text:style-name="P3">Una vez establecida la conexión con el servidor <text:span text:style-name="Source_20_Text">biblioteca__</text:span>, procedí a explorar y verificar que la estructura de la base de datos se hubiese generado correctamente mediante el script automático de Docker:</text:p>
      <text:list text:style-name="L7">
        <text:list-item>
          <text:p text:style-name="P15"><text:span text:style-name="Strong_20_Emphasis">Navegación del Árbol de Objetos</text:span>: En el panel de navegación de la izquierda, desplegué las carpetas del servidor en el siguiente orden:</text:p>
          <text:list>
            <text:list-item>
              <text:p text:style-name="P16"><text:span text:style-name="Strong_20_Emphasis">Bases de Datos</text:span> -&gt; Seleccioné <text:span text:style-name="Source_20_Text">biblioteca_db</text:span>.</text:p>
            </text:list-item>
            <text:list-item>
              <text:p text:style-name="P16"><text:span text:style-name="Strong_20_Emphasis">Esquemas</text:span> -&gt; Desplegué el esquema personalizado <text:span text:style-name="Source_20_Text">biblioteca</text:span> (confirmando que no se mezcló con el esquema público de Postgres).</text:p>
            </text:list-item>
            <text:list-item>
              <text:p text:style-name="P16"><text:span text:style-name="Strong_20_Emphasis">Tablas</text:span>.</text:p>
            </text:list-item>
          </text:list>
        </text:list-item>
        <text:list-item>
          <text:p text:style-name="P15"><text:soft-page-break/><text:span text:style-name="Strong_20_Emphasis">Verificación de Estructura</text:span>: Como se puede observar en la estructura visual de la interfaz, el sistema cargó con éxito las <text:span text:style-name="Strong_20_Emphasis">5 tablas</text:span> requeridas para la gestión de la biblioteca:</text:p>
          <text:list>
            <text:list-item>
              <text:p text:style-name="P16"><text:span text:style-name="Source_20_Text">autores</text:span> (para almacenar escritores).</text:p>
            </text:list-item>
            <text:list-item>
              <text:p text:style-name="P16"><text:span text:style-name="Source_20_Text">categorias</text:span> (para géneros literarios).</text:p>
            </text:list-item>
            <text:list-item>
              <text:p text:style-name="P16"><text:span text:style-name="Source_20_Text">libros</text:span> (con las llaves foráneas conectadas a autor y categoría).</text:p>
            </text:list-item>
            <text:list-item>
              <text:p text:style-name="P16"><text:span text:style-name="Source_20_Text">prestamos</text:span> (con los campos de fecha y estados de control).</text:p>
            </text:list-item>
            <text:list-item>
              <text:p text:style-name="P15"><text:span text:style-name="Source_20_Text">usuarios</text:span> (con la información de los lectores inscritos).</text:p>
            </text:list-item>
          </text:list>
        </text:list-item>
      </text:list>
      <text:p text:style-name="P3">Con esto, corroboré que el script SQL de creación de tablas funcionó correctamente y que las tablas están listas para recibir y consultar información.</text:p>
      <text:h text:style-name="P14" text:outline-level="3"><text:bookmark text:name="user-content-paso-10-validación-general-del-sistema-en-el-query-tool"/>Paso 10: Validación General del Sistema en el Query Tool</text:h>
      <text:p text:style-name="P3">Para dar por concluido el proyecto y asegurar que todo el modelo relacional responde correctamente, utilicé la herramienta de consultas (<text:span text:style-name="Strong_20_Emphasis">Query Tool</text:span>) de pgAdmin para realizar pruebas sobre la base de datos <text:span text:style-name="Source_20_Text">biblioteca_db</text:span>:</text:p>
      <text:list text:style-name="L8">
        <text:list-item>
          <text:p text:style-name="P17"><text:span text:style-name="Strong_20_Emphasis">Pruebas de Consulta</text:span>: Fui ejecutando una a una las consultas de validación diseñadas en el archivo <text:span text:style-name="Source_20_Text">consultas_validacion.sql</text:span>. Estas consultas hacen uniones (<text:span text:style-name="Source_20_Text">JOIN</text:span>) entre las tablas de libros, usuarios, autores, categorías y préstamos.</text:p>
        </text:list-item>
        <text:list-item>
          <text:p text:style-name="P17"><text:span text:style-name="Strong_20_Emphasis">Verificación de Reglas del Negocio</text:span>: A través de estas pruebas generales, verifiqué que la base de datos es capaz de relacionar la información correctamente (por ejemplo, mostrar qué usuario tiene qué libro o qué libros están disponibles). También comprobé que las restricciones de estado (como saber si un préstamo está activo, devuelto o vencido) se reflejan de forma automática y consistente en los resultados de salida.</text:p>
        </text:list-item>
        <text:list-item>
          <text:p text:style-name="P17"><text:span text:style-name="Strong_20_Emphasis">Confirmación del Modelo</text:span>: Ver que los datos se despliegan de manera estructurada en la pantalla de pgAdmin me sirvió para confirmar que el diseño lógico de las tablas es sólido y que el sistema está listo para responder a cualquier requerimiento de reportes que necesite la biblioteca.</text:p>
        </text:list-item>
      </text:list>
      <text:h text:style-name="Heading_20_3" text:outline-level="3"><draw:frame draw:style-name="fr3" draw:name="Image5" text:anchor-type="char" svg:width="17cm" svg:height="14.065cm" draw:z-index="4"><draw:image xlink:href="Pictures/10000001000002BD000002447961E457.png" xlink:type="simple" xlink:show="embed" xlink:actuate="onLoad" draw:mime-type="image/png"/></draw:frame><text:soft-page-break/>Paso <text:span text:style-name="T6">7</text:span>: Validación General del Sistema en el Query Tool</text:h>
      <text:p text:style-name="Text_20_body">Para dar por concluido el proyecto y asegurar que todo el modelo relacional responde correctamente, utilicé la herramienta de consultas (<text:span text:style-name="T1">Query Tool</text:span>) de pgAdmin para realizar pruebas sobre la base de datos <text:span text:style-name="T3">biblioteca_db</text:span>:</text:p>
      <text:list text:style-name="L9">
        <text:list-item>
          <text:p text:style-name="P18"><text:span text:style-name="T1">Pruebas de Consulta</text:span>: Fui ejecutando una a una las consultas de validación diseñadas en el archivo <text:span text:style-name="T3">consultas_validacion.sql</text:span>. Estas consultas hacen uniones (<text:span text:style-name="T3">JOIN</text:span>) entre las tablas de libros, usuarios, autores, categorías y préstamos.</text:p>
        </text:list-item>
        <text:list-item>
          <text:p text:style-name="P18"><text:span text:style-name="T1">Verificación de Reglas del Negocio</text:span>: A través de estas pruebas generales, verifiqué que la base de datos es capaz de relacionar la información correctamente (por ejemplo, mostrar qué usuario tiene qué libro o qué libros están disponibles). También comprobé que las restricciones de estado (como saber si un préstamo está activo, devuelto o vencido) se reflejan de forma automática y consistente en los resultados de salida.</text:p>
        </text:list-item>
        <text:list-item>
          <text:p text:style-name="P18"><text:span text:style-name="T1">Confirmación del Modelo</text:span>: Ver que los datos se despliegan de manera estructurada en la pantalla de pgAdmin me sirvió para confirmar que el diseño lógico de las tablas es sólido y que el sistema está listo para responder a cualquier requerimiento de reportes que necesite la biblioteca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30T21:50:32.071533731</meta:creation-date>
    <dc:date>2026-05-30T22:22:51.084934179</dc:date>
    <meta:editing-duration>PT1M6S</meta:editing-duration>
    <meta:editing-cycles>1</meta:editing-cycles>
    <meta:document-statistic meta:table-count="0" meta:image-count="5" meta:object-count="0" meta:page-count="9" meta:paragraph-count="95" meta:word-count="2327" meta:character-count="14738" meta:non-whitespace-character-count="12578"/>
    <meta:generator>LibreOffice/26.2.2.2$Linux_X86_64 LibreOffice_project/620$Build-2</meta:generator>
  </office:meta>
</office:document-meta>
</file>